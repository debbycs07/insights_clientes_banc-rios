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master-page-name="">
      <style:table-properties style:width="17cm" style:page-number="auto" fo:break-before="auto" fo:break-after="auto" table:align="left" fo:keep-with-next="auto"/>
    </style:style>
    <style:style style:name="Tabela1.A" style:family="table-column">
      <style:table-column-properties style:column-width="3.674cm"/>
    </style:style>
    <style:style style:name="Tabela1.B" style:family="table-column">
      <style:table-column-properties style:column-width="6.253cm"/>
    </style:style>
    <style:style style:name="Tabela1.C" style:family="table-column">
      <style:table-column-properties style:column-width="7.073cm"/>
    </style:style>
    <style:style style:name="Tabela1.A1" style:family="table-cell">
      <style:table-cell-properties style:vertical-align="middle" fo:padding-left="0.318cm" fo:padding-right="0.318cm" fo:padding-top="0.212cm" fo:padding-bottom="0.212cm" fo:border="0.05pt solid #c4c7c5"/>
    </style:style>
    <style:style style:name="P1" style:family="paragraph" style:parent-style-name="Heading_20_2">
      <style:text-properties officeooo:rsid="0016b905" officeooo:paragraph-rsid="0016b905"/>
    </style:style>
    <style:style style:name="P2" style:family="paragraph" style:parent-style-name="Standard">
      <style:text-properties officeooo:rsid="0016b905" officeooo:paragraph-rsid="0016b905"/>
    </style:style>
    <style:style style:name="P3" style:family="paragraph" style:parent-style-name="Standard" style:list-style-name="L2">
      <style:text-properties officeooo:rsid="0016b905" officeooo:paragraph-rsid="0016b905"/>
    </style:style>
    <style:style style:name="P4" style:family="paragraph" style:parent-style-name="Standard" style:list-style-name="L3">
      <style:text-properties officeooo:rsid="0016b905" officeooo:paragraph-rsid="0016b905"/>
    </style:style>
    <style:style style:name="P5" style:family="paragraph" style:parent-style-name="Standard">
      <style:text-properties fo:font-weight="bold" officeooo:rsid="0016b905" officeooo:paragraph-rsid="0016b905" style:font-weight-asian="bold" style:font-weight-complex="bold"/>
    </style:style>
    <style:style style:name="P6" style:family="paragraph" style:parent-style-name="Standard">
      <style:text-properties style:text-underline-style="solid" style:text-underline-width="auto" style:text-underline-color="font-color" officeooo:rsid="0016b905" officeooo:paragraph-rsid="0016b905"/>
    </style:style>
    <style:style style:name="P7" style:family="paragraph" style:parent-style-name="Standard" style:list-style-name="L2">
      <style:text-properties style:text-underline-style="none" officeooo:rsid="0016b905" officeooo:paragraph-rsid="0016b905"/>
    </style:style>
    <style:style style:name="P8" style:family="paragraph" style:parent-style-name="Table_20_Contents">
      <style:paragraph-properties fo:margin-left="0cm" fo:margin-right="0cm" fo:margin-top="0cm" fo:margin-bottom="0cm" style:contextual-spacing="false" fo:line-height="114%" fo:orphans="2" fo:widows="2" fo:text-indent="0cm" style:auto-text-indent="false" fo:keep-with-next="auto"/>
    </style:style>
    <style:style style:name="P9" style:family="paragraph" style:parent-style-name="Table_20_Contents">
      <style:paragraph-properties fo:margin-left="0cm" fo:margin-right="0cm" fo:margin-top="0cm" fo:margin-bottom="0cm" style:contextual-spacing="false" fo:line-height="114%" fo:orphans="2" fo:widows="2" fo:text-indent="0cm" style:auto-text-indent="false" fo:keep-with-next="auto"/>
      <style:text-properties fo:color="#1f1f1f" loext:opacity="100%" style:font-name="Google Sans Text" fo:font-weight="bold" loext:padding="0cm" loext:border="none"/>
    </style:style>
    <style:style style:name="P10" style:family="paragraph" style:parent-style-name="Table_20_Contents">
      <style:paragraph-properties fo:margin-left="0cm" fo:margin-right="0cm" fo:margin-top="0cm" fo:margin-bottom="0cm" style:contextual-spacing="false" fo:line-height="114%" fo:orphans="2" fo:widows="2" fo:text-indent="0cm" style:auto-text-indent="false" fo:keep-with-next="auto"/>
      <style:text-properties fo:color="#1f1f1f" loext:opacity="100%" style:font-name="Google Sans Text" loext:padding="0cm" loext:border="none"/>
    </style:style>
    <style:style style:name="P11" style:family="paragraph" style:parent-style-name="Text_20_body" style:list-style-name="L1"/>
    <style:style style:name="T1" style:family="text">
      <style:text-properties fo:color="#1f1f1f" loext:opacity="100%" style:font-name="Google Sans Text" loext:padding="0cm" loext:border="none"/>
    </style:style>
    <style:style style:name="T2" style:family="text">
      <style:text-properties fo:font-weight="bold"/>
    </style:style>
    <style:style style:name="T3" style:family="text">
      <style:text-properties style:text-underline-style="solid" style:text-underline-width="auto" style:text-underline-color="font-color"/>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andei para o Gemini: </text:p>
      <text:p text:style-name="P2">Atue como analista de dados de um banco.</text:p>
      <text:p text:style-name="P2">Sua tarefa é analisar como tipo base de comentários para identificar se os clientes jovens, isto é, entre idades 18 a 30anos, estão interessam por investimentos</text:p>
      <text:p text:style-name="P2"><text:span text:style-name="T3">Contexto: </text:span>A análise será usada por uma equipe de investimentos varejo para identificar deficiência e elaboração de estratégias para o alcance do público da idade de estudo.</text:p>
      <text:p text:style-name="P2"><text:span text:style-name="T3">Dados disponíveis:</text:span> Número total de clientes do banco, número e dados de todos os clientes do banco nessa faixa etária, como: ocupação, tempo sendo cliente no banco, quem fez investimentos alguma vez, quem ainda tem investimentos ativos e que nunca fez investimentos no banco.</text:p>
      <text:p text:style-name="P6">Instruções de análise:</text:p>
      <text:p text:style-name="P2"/>
      <text:list xml:id="list1633427474" text:style-name="L2">
        <text:list-item>
          <text:p text:style-name="P7">Identifique os principais padrões</text:p>
        </text:list-item>
        <text:list-item>
          <text:p text:style-name="P3">Aponte evidências nos dados fornecidos, usando exemplos.</text:p>
        </text:list-item>
        <text:list-item>
          <text:p text:style-name="P3">Sugira ações práticas para a equipe da área de investimentos varejo.</text:p>
        </text:list-item>
      </text:list>
      <text:p text:style-name="P2"><text:span text:style-name="T3">Formato da resposta: </text:span>Entregue um resumo executivo com até 5 linhas, uma tabela com tema, evidência e ação sugerida, além de uma lista final com as 3 prioridades mais importantes.</text:p>
      <text:p text:style-name="P2"><text:span text:style-name="T3">Restrições:</text:span></text:p>
      <text:list xml:id="list742483616" text:style-name="L3">
        <text:list-item>
          <text:p text:style-name="P4">Use apenas os dados fornecidos.</text:p>
        </text:list-item>
        <text:list-item>
          <text:p text:style-name="P4">Não invente números, causas ou conclusões.</text:p>
        </text:list-item>
        <text:list-item>
          <text:p text:style-name="P4">Não exponha dados pessoais ou sensíveis.</text:p>
        </text:list-item>
        <text:list-item>
          <text:p text:style-name="P4">Informe limitações quando os dados não forem suficientes.</text:p>
        </text:list-item>
        <text:list-item>
          <text:p text:style-name="P4">Use linguagem simples, direta e voltada para tomada de decisão.</text:p>
        </text:list-item>
      </text:list>
      <text:p text:style-name="P2"/>
      <text:p text:style-name="P5">Resposta da IA:</text:p>
      <text:h text:style-name="P1" text:outline-level="2">Resumo Executivo</text:h>
      <text:p text:style-name="Text_20_body">A análise do comportamento dos clientes de 18 a 30 anos revela o nível de engajamento desse público com produtos de investimento, categorizados entre investidores ativos, históricos e inativos. Cruzando esses dados com o tempo de relacionamento e ocupação, identificamos barreiras de entrada e janelas de oportunidade. Como os dados qualitativos dos comentários não foram anexados, esta estratégia foca estritamente nos padrões estruturais da base de dados disponível para direcionar as ações da equipe de varejo.</text:p>
      <text:h text:style-name="Heading_20_2" text:outline-level="2">Matriz de Análise e Ações Estratégicas</text:h>
      <text:p text:style-name="P2"/>
      <text:p text:style-name="P2"/>
      <table:table table:name="Tabela1" table:style-name="Tabela1">
        <table:table-column table:style-name="Tabela1.A"/>
        <table:table-column table:style-name="Tabela1.B"/>
        <table:table-column table:style-name="Tabela1.C"/>
        <table:table-header-rows>
          <table:table-row table:style-name="TableLine2260785597872">
            <table:table-cell table:style-name="Tabela1.A1" office:value-type="string">
              <text:p text:style-name="P8"><text:span text:style-name="Strong_20_Emphasis"><text:span text:style-name="T1">Tema</text:span></text:span></text:p>
            </table:table-cell>
            <table:table-cell table:style-name="Tabela1.A1" office:value-type="string">
              <text:p text:style-name="P8"><text:span text:style-name="Strong_20_Emphasis"><text:span text:style-name="T1">Evidência nos Dados Disponíveis</text:span></text:span></text:p>
            </table:table-cell>
            <table:table-cell table:style-name="Tabela1.A1" office:value-type="string">
              <text:p text:style-name="P8"><text:span text:style-name="Strong_20_Emphasis"><text:span text:style-name="T1">Ação Sugerida</text:span></text:span></text:p>
            </table:table-cell>
          </table:table-row>
        </table:table-header-rows>
        <table:table-row table:style-name="TableLine2260785597872">
          <table:table-cell table:style-name="Tabela1.A1" office:value-type="string">
            <text:p text:style-name="P9">Segmentação por Engajamento</text:p>
          </table:table-cell>
          <table:table-cell table:style-name="Tabela1.A1" office:value-type="string">
            <text:p text:style-name="P10">Divisão clara entre: quem tem investimentos ativos, quem já fez no passado e quem nunca investiu.</text:p>
          </table:table-cell>
          <table:table-cell table:style-name="Tabela1.A1" office:value-type="string">
            <text:p text:style-name="P10">Criar réguas de comunicação distintas para cada grupo (ex: reconquista para ex-investidores e introdução para iniciantes).</text:p>
          </table:table-cell>
        </table:table-row>
        <table:table-row table:style-name="TableLine2260785597872">
          <table:table-cell table:style-name="Tabela1.A1" office:value-type="string">
            <text:p text:style-name="P9">Influência do Ciclo de Vida</text:p>
          </table:table-cell>
          <table:table-cell table:style-name="Tabela1.A1" office:value-type="string">
            <text:p text:style-name="P10">Cruzamento da ocupação (estudantes, autônomos, CLT) com o histórico de investimentos.</text:p>
          </table:table-cell>
          <table:table-cell table:style-name="Tabela1.A1" office:value-type="string">
            <text:p text:style-name="P10">Adaptar a oferta de produtos e o valor mínimo de aplicação de acordo com o perfil de renda estimado pela ocupação.</text:p>
          </table:table-cell>
        </table:table-row>
        <text:soft-page-break/>
        <table:table-row table:style-name="TableLine2260785597872">
          <table:table-cell table:style-name="Tabela1.A1" office:value-type="string">
            <text:p text:style-name="P9">Fidelidade vs. Adesão</text:p>
          </table:table-cell>
          <table:table-cell table:style-name="Tabela1.A1" office:value-type="string">
            <text:p text:style-name="P10">Relação entre o tempo sendo cliente no banco e o momento em que o primeiro investimento foi realizado.</text:p>
          </table:table-cell>
          <table:table-cell table:style-name="Tabela1.A1" office:value-type="string">
            <text:p text:style-name="P10">Implementar gatilhos de oferta de investimento logo nos primeiros meses de abertura de conta para novos clientes jovens.</text:p>
          </table:table-cell>
        </table:table-row>
      </table:table>
      <text:p text:style-name="P2"/>
      <text:h text:style-name="P1" text:outline-level="2">Limitações dos Dados</text:h>
      <text:p text:style-name="Quotations"><text:span text:style-name="T2">Nota de Atenção:</text:span> Embora a instrução mencione a análise de um "tipo base de comentários", o texto dos comentários em si não foi fornecido. Por esse motivo, não é possível inferir as causas qualitativas (as dores, dúvidas ou reclamações exatas dos clientes). A análise ficou restrita aos dados demográficos e transacionais disponíveis.</text:p>
      <text:h text:style-name="Heading_20_2" text:outline-level="2">As 3 Prioridades Mais Importantes</text:h>
      <text:list xml:id="list187588894" text:style-name="L1">
        <text:list-item>
          <text:p text:style-name="P11"><text:span text:style-name="T2">Ativar os Clientes Inativos via Perfil de Ocupação:</text:span> Mapear os jovens que "nunca investiram", filtrando-os por ocupação para desenhar campanhas com linguagem e aportes mínimos adequados à realidade financeira atual deles.</text:p>
        </text:list-item>
        <text:list-item>
          <text:p text:style-name="P11"><text:span text:style-name="T2">Reter e Rentabilizar os Investidores Ativos:</text:span> Identificar o padrão dos jovens que já investem hoje para replicar o modelo de carteira para os demais e garantir que eles não migrem para a concorrência.</text:p>
        </text:list-item>
        <text:list-item>
          <text:p text:style-name="P11"><text:span text:style-name="T2">Investigar o Churn de Investimentos:</text:span> Analisar o grupo que "já fez investimentos alguma vez, mas não tem mais nada ativo" para entender o motivo da saída e propor produtos de liquidez ou objetivos de curto prazo que os tragam de volta.</text:p>
        </text:list-item>
      </text:list>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6-26T16:07:01.830000000</meta:creation-date>
    <dc:date>2026-06-26T16:11:31.254000000</dc:date>
    <meta:editing-duration>PT4M30S</meta:editing-duration>
    <meta:editing-cycles>1</meta:editing-cycles>
    <meta:document-statistic meta:table-count="1" meta:image-count="0" meta:object-count="0" meta:page-count="2" meta:paragraph-count="38" meta:word-count="581" meta:character-count="3676" meta:non-whitespace-character-count="3143"/>
    <meta:generator>LibreOffice/7.3.0.3$Windows_X86_64 LibreOffice_project/0f246aa12d0eee4a0f7adcefbf7c878fc2238db3</meta:generator>
  </office:meta>
</office:document-meta>
</file>